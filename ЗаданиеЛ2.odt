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800000269C9279C38.png" manifest:media-type="image/png"/>
  <manifest:file-entry manifest:full-path="Pictures/1000000000000335000002C52EE8382D.png" manifest:media-type="image/png"/>
  <manifest:file-entry manifest:full-path="Pictures/10000000000002F6000002A9DDAC8C45.png" manifest:media-type="image/png"/>
  <manifest:file-entry manifest:full-path="Pictures/10000000000001FA0000024AA548AB90.png" manifest:media-type="image/png"/>
  <manifest:file-entry manifest:full-path="Pictures/100000000000037300000276368B2B1A.png" manifest:media-type="image/png"/>
  <manifest:file-entry manifest:full-path="Pictures/10000000000002F60000027CE5683EE9.png" manifest:media-type="image/png"/>
  <manifest:file-entry manifest:full-path="Pictures/100000000000017B0000023EBC2A75C5.png" manifest:media-type="image/png"/>
  <manifest:file-entry manifest:full-path="Pictures/10000000000002E0000002339B9E96EC.png" manifest:media-type="image/png"/>
  <manifest:file-entry manifest:full-path="Pictures/100000000000038600000298E63778B5.png" manifest:media-type="image/png"/>
  <manifest:file-entry manifest:full-path="Pictures/100000000000025B00000236D2EB4111.png" manifest:media-type="image/png"/>
  <manifest:file-entry manifest:full-path="Pictures/1000000000000113000000D3057919E6.png" manifest:media-type="image/png"/>
  <manifest:file-entry manifest:full-path="Pictures/10000000000001FC0000023D1166BF0B.png" manifest:media-type="image/png"/>
  <manifest:file-entry manifest:full-path="Pictures/100000000000018D0000029359D40B4F.png" manifest:media-type="image/png"/>
  <manifest:file-entry manifest:full-path="Pictures/100000000000018B000000B4DADD15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Roman" officeooo:rsid="001ae8b8" officeooo:paragraph-rsid="001ae8b8"/>
    </style:style>
    <style:style style:name="P2" style:family="paragraph" style:parent-style-name="Standard">
      <style:text-properties style:font-name="Nimbus Roman" officeooo:rsid="001c29c5" officeooo:paragraph-rsid="001c29c5"/>
    </style:style>
    <style:style style:name="P3" style:family="paragraph" style:parent-style-name="Standard">
      <style:text-properties style:font-name="Nimbus Roman" officeooo:rsid="001dabca" officeooo:paragraph-rsid="001dabca"/>
    </style:style>
    <style:style style:name="P4" style:family="paragraph" style:parent-style-name="Standard">
      <style:text-properties style:font-name="Nimbus Roman" officeooo:rsid="001ea940" officeooo:paragraph-rsid="001ea940"/>
    </style:style>
    <style:style style:name="P5" style:family="paragraph" style:parent-style-name="Standard">
      <style:text-properties style:font-name="Nimbus Roman" officeooo:rsid="001f7696" officeooo:paragraph-rsid="001f7696"/>
    </style:style>
    <style:style style:name="T1" style:family="text">
      <style:text-properties officeooo:rsid="001c29c5"/>
    </style:style>
    <style:style style:name="T2" style:family="text">
      <style:text-properties officeooo:rsid="001ea9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</text:p>
      <text:p text:style-name="P1"/>
      <text:p text:style-name="P1">1. Использовала структуру head. html, body</text:p>
      <text:p text:style-name="P1">2. Добавила заголовок и абзацы, список, фотку и ссылку</text:p>
      <text:p text:style-name="P1">3. Прикрепила css через тег style</text:p>
      <text:p text:style-name="P1">3. Везде цвет, размер задала и применила ховер-эфект<draw:frame draw:style-name="fr1" draw:name="Изображение1" text:anchor-type="char" svg:x="7.146cm" svg:y="0.199cm" svg:width="9.671cm" svg:height="8.352cm" draw:z-index="0"><draw:image xlink:href="Pictures/1000000000000335000002C52EE838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2" text:anchor-type="char" svg:x="3.403cm" svg:y="0.422cm" svg:width="8.744cm" svg:height="10.125cm" draw:z-index="1"><draw:image xlink:href="Pictures/10000000000001FA0000024AA548AB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Задание 2<draw:frame draw:style-name="fr1" draw:name="Изображение3" text:anchor-type="char" svg:x="2.568cm" svg:y="0.175cm" svg:width="12.141cm" svg:height="8.662cm" draw:z-index="2"><draw:image xlink:href="Pictures/100000000000037300000276368B2B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4" text:anchor-type="char" svg:x="-1.702cm" svg:y="0.732cm" svg:width="11.753cm" svg:height="8.989cm" draw:z-index="3"><draw:image xlink:href="Pictures/10000000000002E0000002339B9E96EC.png" xlink:type="simple" xlink:show="embed" xlink:actuate="onLoad" draw:mime-type="image/png"/></draw:frame></text:p>
      <text:p text:style-name="P1"><draw:frame draw:style-name="fr1" draw:name="Изображение5" text:anchor-type="char" svg:x="7.385cm" svg:y="2.427cm" svg:width="6.258cm" svg:height="4.801cm" draw:z-index="4"><draw:image xlink:href="Pictures/1000000000000113000000D3057919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. <text:span text:style-name="T1">Сделала заголовки, абзацы, цитату, список и подчеркивание</text:span></text:p>
      <text:p text:style-name="P2">2. Задала стиль, отступы, выравнивание, оформление списка, подчеркива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Задание 3</text:p>
      <text:p text:style-name="P3"><draw:frame draw:style-name="fr2" draw:name="Изображение6" text:anchor-type="char" svg:width="12.254cm" svg:height="9.019cm" draw:z-index="5"><draw:image xlink:href="Pictures/100000000000038600000298E63778B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7" text:anchor-type="char" svg:x="2.951cm" svg:y="0.201cm" svg:width="12.213cm" svg:height="11.464cm" draw:z-index="6"><draw:image xlink:href="Pictures/100000000000025B00000236D2EB411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сё так же заголовки и тд, но там разделы по блокам и верхнее меню с ссылками</text:p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Задание 4</text:p>
      <text:p text:style-name="P3"/>
      <text:p text:style-name="P4"><draw:frame draw:style-name="fr2" draw:name="Изображение8" text:anchor-type="char" svg:width="13.78cm" svg:height="12.379cm" draw:z-index="7"><draw:image xlink:href="Pictures/10000000000002F6000002A9DDAC8C45.png" xlink:type="simple" xlink:show="embed" xlink:actuate="onLoad" draw:mime-type="image/png"/></draw:frame><draw:frame draw:style-name="fr1" draw:name="Изображение9" text:anchor-type="char" svg:x="5.3cm" svg:y="12.51cm" svg:width="10.633cm" svg:height="8.92cm" draw:z-index="8"><draw:image xlink:href="Pictures/10000000000002F60000027CE5683E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1. <text:span text:style-name="T2">Три блока, заголовки, абзацы и картинк</text:span></text:p>
      <text:p text:style-name="P4">2. Там <text:s/>задала стили, отступы, тени, фон, ширину изображения и тд</text:p>
      <text:p text:style-name="P4"/>
      <text:p text:style-name="P4">Задание 5</text:p>
      <text:p text:style-name="P4"/>
      <text:p text:style-name="P5">1. Всё такая же структура, только теперь с контактами</text:p>
      <text:p text:style-name="P5">2. Сделала карточки, оформила текст, список и фотку</text:p>
      <text:p text:style-name="P4"/>
      <text:p text:style-name="P1"/>
      <text:p text:style-name="P1"><draw:frame draw:style-name="fr1" draw:name="Изображение10" text:anchor-type="char" svg:x="0.441cm" svg:y="0.042cm" svg:width="10.44cm" svg:height="11.776cm" draw:z-index="9"><draw:image xlink:href="Pictures/10000000000001FC0000023D1166BF0B.png" xlink:type="simple" xlink:show="embed" xlink:actuate="onLoad" draw:mime-type="image/png"/></draw:frame></text:p>
      <text:p text:style-name="P1"><draw:frame draw:style-name="fr1" draw:name="Изображение12" text:anchor-type="char" svg:x="12.539cm" svg:y="0.129cm" svg:width="5.907cm" svg:height="9.805cm" draw:z-index="11"><draw:image xlink:href="Pictures/100000000000018D0000029359D40B4F.png" xlink:type="simple" xlink:show="embed" xlink:actuate="onLoad" draw:mime-type="image/png"/></draw:frame></text:p>
      <text:p text:style-name="P1"/>
      <text:p text:style-name="P1"><draw:frame draw:style-name="fr1" draw:name="Изображение11" text:anchor-type="char" svg:x="8.779cm" svg:y="0.051cm" svg:width="9.719cm" svg:height="4.429cm" draw:z-index="10"><draw:image xlink:href="Pictures/100000000000018B000000B4DADD15F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Изображение13" text:anchor-type="char" svg:x="11.019cm" svg:y="2.312cm" svg:width="6.616cm" svg:height="10.021cm" draw:z-index="12"><draw:image xlink:href="Pictures/100000000000017B0000023EBC2A75C5.png" xlink:type="simple" xlink:show="embed" xlink:actuate="onLoad" draw:mime-type="image/png"/></draw:frame><draw:frame draw:style-name="fr1" draw:name="Изображение14" text:anchor-type="char" svg:x="-0.381cm" svg:y="2.925cm" svg:width="10.633cm" svg:height="10.38cm" draw:z-index="13"><draw:image xlink:href="Pictures/100000000000027800000269C9279C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01:26:37.423940364</meta:creation-date>
    <dc:date>2026-04-18T02:23:24.498504324</dc:date>
    <meta:editing-duration>PT3M58S</meta:editing-duration>
    <meta:editing-cycles>1</meta:editing-cycles>
    <meta:document-statistic meta:table-count="0" meta:image-count="14" meta:object-count="0" meta:page-count="5" meta:paragraph-count="16" meta:word-count="106" meta:character-count="645" meta:non-whitespace-character-count="554"/>
    <meta:generator>LibreOffice/24.2.7.2$Linux_X86_64 LibreOffice_project/420$Build-2</meta:generator>
  </office:meta>
</office:document-meta>
</file>