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A00000184CF8F58B3.png" manifest:media-type="image/png"/>
  <manifest:file-entry manifest:full-path="Pictures/100000000000032F000001843AF025DA.png" manifest:media-type="image/png"/>
  <manifest:file-entry manifest:full-path="Pictures/100000000000010C000002325D0B108B.png" manifest:media-type="image/png"/>
  <manifest:file-entry manifest:full-path="Pictures/100000000000032100000189A04AB96A.png" manifest:media-type="image/png"/>
  <manifest:file-entry manifest:full-path="Pictures/10000000000001100000022DCA33B274.png" manifest:media-type="image/png"/>
  <manifest:file-entry manifest:full-path="Pictures/1000000000000109000001FB4238A6DA.png" manifest:media-type="image/png"/>
  <manifest:file-entry manifest:full-path="Pictures/100000000000010B0000022379AC5A9B.png" manifest:media-type="image/png"/>
  <manifest:file-entry manifest:full-path="Pictures/1000000000000106000002450435FD05.png" manifest:media-type="image/png"/>
  <manifest:file-entry manifest:full-path="Pictures/100000000000033300000182F39D06B3.png" manifest:media-type="image/png"/>
  <manifest:file-entry manifest:full-path="Pictures/10000000000003360000018E8817FA5F.png" manifest:media-type="image/png"/>
  <manifest:file-entry manifest:full-path="Pictures/1000000000000107000002248C11CEF8.png" manifest:media-type="image/png"/>
  <manifest:file-entry manifest:full-path="Pictures/10000000000001050000022DCB986976.png" manifest:media-type="image/png"/>
  <manifest:file-entry manifest:full-path="Pictures/100000000000032D0000018887553798.png" manifest:media-type="image/png"/>
  <manifest:file-entry manifest:full-path="Pictures/1000000000000108000002218FC5D10F.png" manifest:media-type="image/png"/>
  <manifest:file-entry manifest:full-path="Pictures/100000000000010B0000020B46DD5245.png" manifest:media-type="image/png"/>
  <manifest:file-entry manifest:full-path="Pictures/100000000000032A0000018D05AAF44A.png" manifest:media-type="image/png"/>
  <manifest:file-entry manifest:full-path="Pictures/10000000000003310000018A2B4CC5DD.png" manifest:media-type="image/png"/>
  <manifest:file-entry manifest:full-path="Pictures/100000000000010400000219F5D39BCF.png" manifest:media-type="image/png"/>
  <manifest:file-entry manifest:full-path="Pictures/10000000000003280000018D97C5D9D9.png" manifest:media-type="image/png"/>
  <manifest:file-entry manifest:full-path="Pictures/1000000000000339000001885195FF5F.png" manifest:media-type="image/png"/>
  <manifest:file-entry manifest:full-path="Pictures/10000000000001090000022CC8B1EA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63" officeooo:paragraph-rsid="000fd063"/>
    </style:style>
    <style:style style:name="P2" style:family="paragraph" style:parent-style-name="Standard">
      <style:text-properties officeooo:rsid="00110900" officeooo:paragraph-rsid="00110900"/>
    </style:style>
    <style:style style:name="T1" style:family="text">
      <style:text-properties officeooo:rsid="000fd0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Блок: в статье рассказывают о том, как задавать переменные через let и var, а также, как присваивать им значение через = и вызывать их через alert, также говорят, как копировать значение одной в другую и задавать имена переменным, как задать константу </text:p>
      <text:p text:style-name="Standard">2. В статье рассказывают, как задавать переменную var, не знаю, как это комментировать... </text:p>
      <text:p text:style-name="Standard">В видео рассказывают, что записывать переменную нужно только через var, let и const, иначе это ошибка</text:p>
      <text:p text:style-name="Standard">3. В статье рассказывают, как использовать let и его отличие от var: область видимости объявлений распространяется на блоки и функции, доступ к объявлениям возможен только после того, как будет достигнуто место объявления, объявления не создают свойства в globalThis, если они объявлены на верхнем уровне скрипта, объявления не могут быть переобъявлены никаким другим объявлением в той же области видимости, начинается с объявлений, а не высказываний. Это значит, что вы не можете использовать одиночное let объявление в качестве тела блока (что логично, поскольку получить доступ к переменной невозможно). Ещё рассказывают о временной мертвой зоне. </text:p>
      <text:p text:style-name="Standard">4. В статье рассказывают, как объявлять переменные через let, var и давать значение с помощью = , рассказали, почему let лучше var, рассказали, как давать имена переменным, рассказали, как задавать численные, логические и значения "струны", [массивы]. Говорят, что в js динамический ввод текста, он сам понимает число или строка заданна, как значение переменной</text:p>
      <text:p text:style-name="Standard">5. Объясняют, как использовать подъем. Подъем перемещает функции, определенные с ключевым словом function, в начало файла перед выполнением кода, ппеременны заданные через var, также поднимаются</text:p>
      <text:p text:style-name="Standard">6. Снова рассказывают, что такое var, let и cons, рассказывают, что есть глобальная область видимости, это переменные доступны везде, и локальная область видимости, это блочная и функциональная, глобальная область видимости доступна всем и может использоваться в функциях и блоках кода, блоки кода создаются с помощью фигурных скобок, let или const внутри блока кода создают локальную область видимости</text:p>
      <text:p text:style-name="Standard">7. Блок: в статье рассказывают о типах данных, есть число, можно проводить разные операции, сложение, умножение и тд, при помощи Biglnt мы модем обрабатывать огромные чисоа, главное в конце добавить n, есть тип данных строка задается при помощи "", есть boolean, присваиваем значение правда или ложь, значение null и undefined отсылает на несуществующий объект, который потом будет, typeof возвращает тип операнда, при вызове typeof x возвращается строка с именем типа</text:p>
      <text:p text:style-name="Standard">8. В статье рассказывается про null, он служит для обозначения того, что переменная не указывает ни на какой объект</text:p>
      <text:p text:style-name="Standard">9. Рассказывают о boolean, логическое значение представляет либо истину, либо ложь, может использоваться в инструкциях if для проверки условий, &gt; и &lt; возвращают логические значения, для проверки равенства используется ===, числа, кроме нуля, возвращаются как правда, строки, содержащие что-то, возвращаются правдой</text:p>
      <text:p text:style-name="Standard">10. Рассказвают, что BigInt создан для работы с очень большими числами.</text:p>
      <text:p text:style-name="Standard">11. В статье рассказывают о строках, строки могут быть заключены в одинарные, двойные кавычки или обратные кавычки, есть «символ новой строки», обозначаемый как \n, все специальные символы начинаются с обратной косой черты \, length определяет длину строки, в JavaScript строки нельзя изменить, невозможно изменить ни один символ, <text:s/>toLowerCase() и toUpperCase() меняют регистр, есть три способа получить подстроку: substring, substr и slice</text:p>
      <text:p text:style-name="Standard">12. undefined использует для переменных, не получивших значение, в консоли отображается «не определено», пока переменная не получит значение</text:p>
      <text:p text:style-name="Standard">13. В статье рассказывают об объектах Объект можно создать с помощью фигурных скобок {…} и необязательного списка свойств, у свойства есть ключ, имя или идентификатор, который находится перед двоеточием ":", и значение справа от него, при попытке прочитать несуществующее свойство возвращается undefined, для этого также есть специальный оператор "in", <text:s/>для перебора всех ключей объекта <text:span text:style-name="T1">существует специальная форма цикла for..in</text:span></text:p>
      <text:p text:style-name="P1"><text:soft-page-break/>14. В статье рассказывают, что с помощью оператора typeOf можно определить тип данных переменной, нужны скобки в конце, все функции-конструкторы, вызываемые с помощью new, возвращают не примитивные типы данны</text:p>
      <text:p text:style-name="P1">15. Рассказывают о преобразовании типов данных, + объединяет строки, а не складывает числа, функция parseInt преобразует строку в число.</text:p>
      <text:p text:style-name="P1">16. В статье рассказывают о неявном приведении типов, это переделывание строки там, где ожидается число, объект там, где ожидается строка и т. д, потом про оператор +, массивы, значения истины и лжи</text:p>
      <text:p text:style-name="P1">17. Рассказывают о явном и неявном типе преобразования данных, в явном типе преобиазование в ручную, используется функция number для преобразования строки в число.</text:p>
      <text:p text:style-name="P1">18. Карты позволяют создавать коллекции пар «ключ — значение», для создания карт используют map и new, для настроцки set, size позволяет узнать кол-во карт, delete используется для удаления пар, clear удаляет все пары, values выводит все значения, keys выводит все ключи</text:p>
      <text:p text:style-name="P1">19. В статье рассказывают о структурировании данных и то насколько посещаемость пользователями увеличивается, а также их прибывание на странице, данные оформляются в виде кода и встраиваются в тег &lt;script&gt; внутри элементов &lt;head&gt; и &lt;body&gt; на HTML-странице</text:p>
      <text:p text:style-name="P1">20. Рассказывают, что json это типа формат представления данных, круто отправляется и читается, поддерживает строки, числа, логические значения, null и массивы, для создания файла нужно добавить расширение .json, ключи заключаются в двойные кавычки, значения, нет, функция JSON.parse принимает строку JSON и преобразует её в объект JavaScript</text:p>
      <text:p text:style-name="P1"/>
      <text:p text:style-name="P1">1) <draw:frame draw:style-name="fr3" draw:name="Изображение1" text:anchor-type="char" svg:width="4.514cm" svg:height="9.248cm" draw:z-index="0"><draw:image xlink:href="Pictures/100000000000010B0000022379AC5A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<draw:frame draw:style-name="fr1" draw:name="Изображение2" text:anchor-type="char" svg:x="13.171cm" svg:y="-0.39cm" svg:width="3.859cm" svg:height="8.557cm" draw:z-index="1"><draw:image xlink:href="Pictures/1000000000000106000002450435FD05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3" text:anchor-type="char" svg:x="-0.868cm" svg:y="0.083cm" svg:width="13.836cm" svg:height="6.699cm" draw:z-index="2"><draw:image xlink:href="Pictures/10000000000003360000018E8817FA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 <draw:frame draw:style-name="fr2" draw:name="Изображение4" text:anchor-type="char" svg:width="3.473cm" svg:height="7.235cm" draw:z-index="3"><draw:image xlink:href="Pictures/1000000000000107000002248C11CE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"><draw:frame draw:style-name="fr1" draw:name="Изображение5" text:anchor-type="char" svg:x="7.421cm" svg:y="0.303cm" svg:width="3.999cm" svg:height="8.534cm" draw:z-index="4"><draw:image xlink:href="Pictures/10000000000001050000022DCB986976.png" xlink:type="simple" xlink:show="embed" xlink:actuate="onLoad" draw:mime-type="image/png"/></draw:frame></text:p>
      <text:p text:style-name="P1">4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) <draw:frame draw:style-name="fr1" draw:name="Изображение6" text:anchor-type="char" svg:x="1.533cm" svg:y="1.226cm" svg:width="12.386cm" svg:height="6.07cm" draw:z-index="5"><draw:image xlink:href="Pictures/100000000000032A0000018D05AAF4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) </text:p>
      <text:p text:style-name="P1"><draw:frame draw:style-name="fr1" draw:name="Изображение7" text:anchor-type="char" svg:x="0.864cm" svg:y="0.153cm" svg:width="13.25cm" svg:height="6.389cm" draw:z-index="6"><draw:image xlink:href="Pictures/100000000000032D00000188875537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) <draw:frame draw:style-name="fr1" draw:name="Изображение8" text:anchor-type="char" svg:x="5.99cm" svg:y="0.053cm" svg:width="5.02cm" svg:height="10.368cm" draw:z-index="7"><draw:image xlink:href="Pictures/100000000000010400000219F5D39B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) <draw:frame draw:style-name="fr2" draw:name="Изображение9" text:anchor-type="char" svg:width="4.665cm" svg:height="9.631cm" draw:z-index="8"><draw:image xlink:href="Pictures/1000000000000108000002218FC5D1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) </text:p>
      <text:p text:style-name="P1"><draw:frame draw:style-name="fr1" draw:name="Изображение10" text:anchor-type="char" svg:x="0.725cm" svg:y="0.208cm" svg:width="12.525cm" svg:height="6.04cm" draw:z-index="9"><draw:image xlink:href="Pictures/10000000000003310000018A2B4CC5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)</text:p>
      <text:p text:style-name="P1"><draw:frame draw:style-name="fr1" draw:name="Изображение11" text:anchor-type="char" svg:x="0.945cm" svg:y="0.079cm" svg:width="12.22cm" svg:height="6.004cm" draw:z-index="10"><draw:image xlink:href="Pictures/10000000000003280000018D97C5D9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) <draw:frame draw:style-name="fr2" draw:name="Изображение12" text:anchor-type="char" svg:width="4.941cm" svg:height="10.365cm" draw:z-index="11"><draw:image xlink:href="Pictures/10000000000001090000022CC8B1EA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) <draw:frame draw:style-name="fr1" draw:name="Изображение13" text:anchor-type="char" svg:x="0.166cm" svg:y="0.725cm" svg:width="12.083cm" svg:height="5.741cm" draw:z-index="12"><draw:image xlink:href="Pictures/1000000000000339000001885195FF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4" text:anchor-type="char" svg:x="7.13cm" svg:y="0.039cm" svg:width="4.694cm" svg:height="8.978cm" draw:z-index="13"><draw:image xlink:href="Pictures/1000000000000109000001FB4238A6DA.png" xlink:type="simple" xlink:show="embed" xlink:actuate="onLoad" draw:mime-type="image/png"/></draw:frame>13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4)<draw:frame draw:style-name="fr2" draw:name="Изображение15" text:anchor-type="char" svg:width="5.062cm" svg:height="10.366cm" draw:z-index="14"><draw:image xlink:href="Pictures/10000000000001100000022DCA33B2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)<draw:frame draw:style-name="fr1" draw:name="Изображение16" text:anchor-type="char" svg:x="1.254cm" svg:y="0.582cm" svg:width="11.55cm" svg:height="5.666cm" draw:z-index="15"><draw:image xlink:href="Pictures/100000000000032100000189A04AB9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)<draw:frame draw:style-name="fr1" draw:name="Изображение17" text:anchor-type="char" svg:x="6.371cm" svg:y="0.041cm" svg:width="4.258cm" svg:height="8.929cm" draw:z-index="16"><draw:image xlink:href="Pictures/100000000000010C000002325D0B10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7)<draw:frame draw:style-name="fr1" draw:name="Изображение18" text:anchor-type="char" svg:x="1.085cm" svg:y="0.945cm" svg:width="11.719cm" svg:height="5.579cm" draw:z-index="17"><draw:image xlink:href="Pictures/100000000000032F000001843AF025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8) <draw:frame draw:style-name="fr1" draw:name="Изображение19" text:anchor-type="char" svg:x="0.25cm" svg:y="0.669cm" svg:width="10.104cm" svg:height="4.84cm" draw:z-index="18"><draw:image xlink:href="Pictures/100000000000032A00000184CF8F58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20" text:anchor-type="char" svg:x="6.521cm" svg:y="0.808cm" svg:width="4.293cm" svg:height="8.408cm" draw:z-index="19"><draw:image xlink:href="Pictures/100000000000010B0000020B46DD5245.png" xlink:type="simple" xlink:show="embed" xlink:actuate="onLoad" draw:mime-type="image/png"/></draw:frame></text:p>
      <text:p text:style-name="P1">19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0) <draw:frame draw:style-name="fr1" draw:name="Изображение21" text:anchor-type="char" svg:x="0.333cm" svg:y="0.556cm" svg:width="12.277cm" svg:height="5.786cm" draw:z-index="20"><draw:image xlink:href="Pictures/100000000000033300000182F39D06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00:35:01.317110680</meta:creation-date>
    <dc:date>2026-04-26T00:59:32.455825558</dc:date>
    <meta:editing-duration>PT3M</meta:editing-duration>
    <meta:editing-cycles>1</meta:editing-cycles>
    <meta:document-statistic meta:table-count="0" meta:image-count="21" meta:object-count="0" meta:page-count="9" meta:paragraph-count="41" meta:word-count="821" meta:character-count="5665" meta:non-whitespace-character-count="4866"/>
    <meta:generator>LibreOffice/24.2.7.2$Linux_X86_64 LibreOffice_project/420$Build-2</meta:generator>
  </office:meta>
</office:document-meta>
</file>