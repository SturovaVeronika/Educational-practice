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6000002CB78FA0B21.png" manifest:media-type="image/png"/>
  <manifest:file-entry manifest:full-path="Pictures/10000000000003FB000002C29AB1B696.png" manifest:media-type="image/png"/>
  <manifest:file-entry manifest:full-path="Pictures/100000000000046A000002F1D22AA61E.png" manifest:media-type="image/png"/>
  <manifest:file-entry manifest:full-path="Pictures/10000000000004C000000260D83C939D.png" manifest:media-type="image/png"/>
  <manifest:file-entry manifest:full-path="Pictures/100000000000046B000002DBA47149A5.png" manifest:media-type="image/png"/>
  <manifest:file-entry manifest:full-path="Pictures/100000000000021A000002C700B83322.png" manifest:media-type="image/png"/>
  <manifest:file-entry manifest:full-path="Pictures/100000010000036A0000032096193853.png" manifest:media-type="image/png"/>
  <manifest:file-entry manifest:full-path="Pictures/10000000000004D50000029EFB0317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219aeb" officeooo:paragraph-rsid="00219aeb"/>
    </style:style>
    <style:style style:name="P2" style:family="paragraph" style:parent-style-name="Standard">
      <style:text-properties style:font-name="Nimbus Roman" fo:font-size="14pt" officeooo:rsid="00219aeb" officeooo:paragraph-rsid="00219aeb" style:font-size-asian="12.25pt" style:font-size-complex="14pt"/>
    </style:style>
    <style:style style:name="P3" style:family="paragraph" style:parent-style-name="Standard">
      <style:paragraph-properties fo:break-before="page"/>
      <style:text-properties style:font-name="Nimbus Roman" fo:font-size="14pt" officeooo:rsid="00219aeb" officeooo:paragraph-rsid="00219aeb" style:font-size-asian="12.25pt" style:font-size-complex="14pt"/>
    </style:style>
    <style:style style:name="P4" style:family="paragraph" style:parent-style-name="Standard">
      <style:text-properties style:font-name="Nimbus Roman" fo:font-size="14pt" officeooo:rsid="002478ed" officeooo:paragraph-rsid="002478ed" style:font-size-asian="12.25pt" style:font-size-complex="14pt"/>
    </style:style>
    <style:style style:name="P5" style:family="paragraph" style:parent-style-name="Standard">
      <style:text-properties style:font-name="Nimbus Roman" fo:font-size="14pt" officeooo:paragraph-rsid="00219aeb" style:font-size-asian="14pt" style:font-size-complex="14pt"/>
    </style:style>
    <style:style style:name="P6" style:family="paragraph" style:parent-style-name="Standard">
      <style:text-properties style:font-name="Nimbus Roman" fo:font-size="14pt" officeooo:rsid="00219aeb" officeooo:paragraph-rsid="00219aeb" style:font-size-asian="14pt" style:font-size-complex="14pt"/>
    </style:style>
    <style:style style:name="P7" style:family="paragraph" style:parent-style-name="Standard">
      <style:text-properties style:font-name="Nimbus Roman" fo:font-size="14pt" officeooo:rsid="0022f92d" officeooo:paragraph-rsid="0022f92d" style:font-size-asian="14pt" style:font-size-complex="14pt"/>
    </style:style>
    <style:style style:name="P8" style:family="paragraph" style:parent-style-name="Standard">
      <style:text-properties style:font-name="Nimbus Roman" fo:font-size="14pt" officeooo:rsid="00232dd7" officeooo:paragraph-rsid="00232dd7" style:font-size-asian="14pt" style:font-size-complex="14pt"/>
    </style:style>
    <style:style style:name="P9" style:family="paragraph" style:parent-style-name="Standard">
      <style:text-properties style:font-name="Times New Roman" fo:font-size="14pt" officeooo:rsid="00251888" officeooo:paragraph-rsid="00251888" style:font-size-asian="14pt" style:font-name-complex="Times New Roman1" style:font-size-complex="14pt"/>
    </style:style>
    <style:style style:name="P10" style:family="paragraph" style:parent-style-name="Standard">
      <style:text-properties style:font-name="Nimbus Roman" fo:font-size="14pt" officeooo:rsid="00272161" officeooo:paragraph-rsid="00272161" style:font-size-asian="12.25pt" style:font-size-complex="14pt"/>
    </style:style>
    <style:style style:name="P11" style:family="paragraph" style:parent-style-name="Standard">
      <style:text-properties style:font-name="Nimbus Roman" fo:font-size="14pt" officeooo:rsid="0028e858" officeooo:paragraph-rsid="0028e858" style:font-size-asian="12.25pt" style:font-size-complex="14pt"/>
    </style:style>
    <style:style style:name="P12" style:family="paragraph" style:parent-style-name="Standard">
      <style:text-properties style:font-name="Nimbus Roman" fo:font-size="14pt" officeooo:rsid="00297e46" officeooo:paragraph-rsid="00297e46" style:font-size-asian="12.25pt" style:font-size-complex="14pt"/>
    </style:style>
    <style:style style:name="P13" style:family="paragraph" style:parent-style-name="Standard">
      <style:text-properties style:font-name="Nimbus Roman" fo:font-size="14pt" officeooo:rsid="0029b40a" officeooo:paragraph-rsid="0029b40a" style:font-size-asian="12.25pt" style:font-size-complex="14pt"/>
    </style:style>
    <style:style style:name="P14" style:family="paragraph" style:parent-style-name="Standard">
      <style:text-properties style:font-name="Nimbus Roman" fo:font-size="14pt" officeooo:rsid="002478ed" officeooo:paragraph-rsid="002478ed" style:font-size-asian="12.25pt" style:font-size-complex="14pt"/>
    </style:style>
    <style:style style:name="T1" style:family="text">
      <style:text-properties officeooo:rsid="00219aeb"/>
    </style:style>
    <style:style style:name="T2" style:family="text">
      <style:text-properties officeooo:rsid="0022f92d"/>
    </style:style>
    <style:style style:name="T3" style:family="text">
      <style:text-properties officeooo:rsid="00232dd7"/>
    </style:style>
    <style:style style:name="T4" style:family="text">
      <style:text-properties style:font-size-asian="14pt"/>
    </style:style>
    <style:style style:name="T5" style:family="text">
      <style:text-properties officeooo:rsid="00219aeb" style:font-size-asian="14pt"/>
    </style:style>
    <style:style style:name="T6" style:family="text">
      <style:text-properties officeooo:rsid="00251888" style:font-size-asian="14pt"/>
    </style:style>
    <style:style style:name="T7" style:family="text">
      <style:text-properties style:font-name="Times New Roman" style:font-size-asian="14pt" style:font-name-complex="Times New Roman1"/>
    </style:style>
    <style:style style:name="T8" style:family="text">
      <style:text-properties style:font-name="Times New Roman" officeooo:rsid="00251888" style:font-size-asian="14pt" style:font-name-complex="Times New Roman1"/>
    </style:style>
    <style:style style:name="T9" style:family="text">
      <style:text-properties style:font-name="Times New Roman" officeooo:rsid="00297e46" style:font-size-asian="14pt" style:font-name-complex="Times New Roman1"/>
    </style:style>
    <style:style style:name="T10" style:family="text">
      <style:text-properties officeooo:rsid="0029b4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</text:p>
      <text:p text:style-name="P5"><draw:frame draw:style-name="fr4" draw:name="Изображение1" text:anchor-type="char" svg:width="18.814cm" svg:height="10.19cm" draw:z-index="0"><draw:image xlink:href="Pictures/10000000000004D50000029EFB03170E.png" xlink:type="simple" xlink:show="embed" xlink:actuate="onLoad" draw:mime-type="image/png"/></draw:frame><text:span text:style-name="T2">1.</text:span><text:span text:style-name="T1">Сначала пишем </text:span>&lt;!DOCTYPE html&gt;, <text:span text:style-name="T1">потом &lt;head&gt;&lt;/head&gt;, потом &lt;html&gt;&lt;/html&gt;, внутри последнего пишем теги &lt;body&gt;&lt;/body&gt;</text:span></text:p>
      <text:p text:style-name="P7">2. Заголовок страницы добавляется через &lt;title&gt;&lt;/title&gt; в тегах <text:span text:style-name="T1">&lt;head&gt;&lt;/head&gt;</text:span></text:p>
      <text:p text:style-name="P7">3.Потом я <text:s/>начала прописывать уже саму страницу в &lt;body&gt;&lt;/body&gt;, для начала заголовок, нужно было взять самый большой &lt;h1&gt;&lt;/h1&gt;</text:p>
      <text:p text:style-name="P7">4.Теперь можно добавлять основную инфу через &lt;p&gt;&lt;/p&gt;</text:p>
      <text:p text:style-name="P7">5.Дальше список нужно создать, он задаётся через &lt;ul&gt;&lt;/ul&gt;, а в &lt;li&gt;&lt;/li&gt; каждая ст<text:span text:style-name="T3">р</text:span>очка проп<text:span text:style-name="T10">и</text:span>сывается</text:p>
      <text:p text:style-name="P8">6.Дальше идет фотка, чтобы вставить используем &lt;img&gt;, а в нём атрибуты scr, он обязателен, а ширина и высота не обязательны, но так поприличнее выглядит.</text:p>
      <text:p text:style-name="P8">7.Ссылки всегда добавляем через &lt;a&gt;&lt;/a&gt; с атрибутом href, как видно здесь просто засунула ссылку в абзац.</text:p>
      <text:p text:style-name="P8"/>
      <text:p text:style-name="P8">Задание 2</text:p>
      <text:p text:style-name="P6"/>
      <text:p text:style-name="P2"/>
      <text:p text:style-name="P2"/>
      <text:p text:style-name="P3"/>
      <text:p text:style-name="P2"/>
      <text:p text:style-name="P4"><draw:frame draw:style-name="fr3" draw:name="Изображение2" text:anchor-type="char" svg:width="17cm" svg:height="15.559cm" draw:z-index="1"><draw:image xlink:href="Pictures/100000010000036A0000032096193853.png" xlink:type="simple" xlink:show="embed" xlink:actuate="onLoad" draw:mime-type="image/png"/></draw:frame><draw:frame draw:style-name="fr1" draw:name="Изображение3" text:anchor-type="char" svg:x="0.882cm" svg:y="10.917cm" svg:width="9.507cm" svg:height="12.564cm" draw:z-index="2"><draw:image xlink:href="Pictures/100000000000021A000002C700B83322.png" xlink:type="simple" xlink:show="embed" xlink:actuate="onLoad" draw:mime-type="image/png"/></draw:frame>f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5"/></text:p>
      <text:p text:style-name="P4"><text:soft-page-break/><text:span text:style-name="T4">Все заголовки прописывала через &lt;h1&gt; &lt;h2&gt; и &lt;h3&gt;, там сделала абзацы, где </text:span><text:span text:style-name="T6">в &lt;h1&gt;</text:span><text:span text:style-name="T4"> нужно</text:span><text:span text:style-name="T6">е</text:span><text:span text:style-name="T4"> выделила шрифтом текст, курсивом &lt;i&gt;&lt;/i&gt; <text:s/>и жирным &lt;b&gt;&lt;/b&gt;, </text:span><text:span text:style-name="T6">в &lt;h2&gt; сделала список, при помощи &lt;ol&gt;&lt;/ol&gt; он делается пронумерованным, потом в &lt;h3&gt;, после фотки, идет цитата с помощью &lt;</text:span><text:span text:style-name="T8">blockquote&gt;&lt;/blockquote&gt;, там же подчеркивание и ссылка.</text:span></text:p>
      <text:p text:style-name="P4"><text:span text:style-name="T8"/></text:p>
      <text:p text:style-name="P9">Задание 3</text:p>
      <text:p text:style-name="P10"><draw:frame draw:style-name="fr2" draw:name="Изображение4" text:anchor-type="char" svg:width="16.787cm" svg:height="12.552cm" draw:z-index="3"><draw:image xlink:href="Pictures/10000000000004C000000260D83C939D.png" xlink:type="simple" xlink:show="embed" xlink:actuate="onLoad" draw:mime-type="image/png"/></draw:frame><text:span text:style-name="T7">Здесь я создала якорные ссылки, нажимая на заголовки, можно переходить в разные разделы страницы</text:span></text:p>
      <text:p text:style-name="P10"><text:span text:style-name="T7"/></text:p>
      <text:p text:style-name="P10"><text:span text:style-name="T7">Задание 4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1"><draw:frame draw:style-name="fr2" draw:name="Изображение5" text:anchor-type="char" svg:width="13.996cm" svg:height="9.045cm" draw:z-index="4"><draw:image xlink:href="Pictures/100000000000046B000002DBA47149A5.png" xlink:type="simple" xlink:show="embed" xlink:actuate="onLoad" draw:mime-type="image/png"/></draw:frame><draw:frame draw:style-name="fr1" draw:name="Изображение6" text:anchor-type="char" svg:x="1.503cm" svg:y="9.043cm" svg:width="13.363cm" svg:height="8.904cm" draw:z-index="5"><draw:image xlink:href="Pictures/100000000000046A000002F1D22AA61E.png" xlink:type="simple" xlink:show="embed" xlink:actuate="onLoad" draw:mime-type="image/png"/></draw:frame><text:soft-page-break/><text:span text:style-name="T7"/></text:p>
      <text:p text:style-name="P11"><text:span text:style-name="T7"/></text:p>
      <text:p text:style-name="P11"><text:span text:style-name="T7">Получился сайт с заголовками, абзацами и картинками.</text:span></text:p>
      <text:p text:style-name="P11"><text:span text:style-name="T7"/></text:p>
      <text:p text:style-name="P11"><text:span text:style-name="T7">Задание 5</text:span></text:p>
      <text:p text:style-name="P11"><draw:frame draw:style-name="fr2" draw:name="Изображение7" text:anchor-type="char" svg:width="13.194cm" svg:height="9.14cm" draw:z-index="6"><draw:image xlink:href="Pictures/10000000000003FB000002C29AB1B696.png" xlink:type="simple" xlink:show="embed" xlink:actuate="onLoad" draw:mime-type="image/png"/></draw:frame><text:soft-page-break/><text:span text:style-name="T9"/></text:p>
      <text:p text:style-name="P12"><draw:frame draw:style-name="fr1" draw:name="Изображение8" text:anchor-type="char" svg:x="0.531cm" svg:y="0.54cm" svg:width="12.97cm" svg:height="9.929cm" draw:z-index="7"><draw:image xlink:href="Pictures/10000000000003A6000002CB78FA0B21.png" xlink:type="simple" xlink:show="embed" xlink:actuate="onLoad" draw:mime-type="image/png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3"><text:span text:style-name="T7">Сделала страницу профиля с заголовками, абзацами, фото, навыками, контактами и соц.сетями</text:span></text:p>
      <text:p text:style-name="P12"><text:span text:style-name="T7"/></text:p>
      <text:p text:style-name="P12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20:47:35.366087547</meta:creation-date>
    <meta:editing-duration>PT57M11S</meta:editing-duration>
    <meta:editing-cycles>4</meta:editing-cycles>
    <meta:generator>LibreOffice/24.2.7.2$Linux_X86_64 LibreOffice_project/420$Build-2</meta:generator>
    <dc:date>2026-03-29T23:02:39.400469613</dc:date>
    <meta:document-statistic meta:table-count="0" meta:image-count="8" meta:object-count="0" meta:page-count="5" meta:paragraph-count="17" meta:word-count="192" meta:character-count="1343" meta:non-whitespace-character-count="1166"/>
  </office:meta>
</office:document-meta>
</file>